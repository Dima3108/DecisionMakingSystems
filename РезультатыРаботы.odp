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0000002E5CA4BE2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title">
      <style:graphic-properties fo:min-height="1.872cm" loext:decorative="false"/>
      <style:paragraph-properties style:writing-mode="lr-tb"/>
    </style:style>
    <style:style style:name="P1" style:family="paragraph">
      <style:paragraph-properties fo:text-align="end"/>
      <style:text-properties fo:font-size="21pt" fo:font-weight="bold" style:font-size-asian="21pt" style:font-weight-asian="bold" style:font-size-complex="21pt" style:font-weight-complex="bold"/>
    </style:style>
    <style:style style:name="P2" style:family="paragraph">
      <loext:graphic-properties draw:fill-color="#ffffff"/>
      <style:paragraph-properties fo:text-align="end"/>
      <style:text-properties fo:font-size="21pt" fo:font-weight="bold" style:font-size-asian="21pt" style:font-weight-asian="bold" style:font-size-complex="21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style:font-name="Times New Roman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Результаты работы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Павлов Д.П.</text:span></text:p>
            <text:p text:style-name="P1"><text:span text:style-name="T1">Буткевич С.С.</text:span></text:p>
            <text:p text:style-name="P1"><text:span text:style-name="T1">Лаптев</text:span></text:p>
            <text:p text:style-name="P1"><text:span text:style-name="T1">Тарасона</text:span></text:p>
            <text:p text:style-name="P1"><text:span text:style-name="T1">Кокин</text:span></text:p>
            <text:p text:style-name="P1"><text:span text:style-name="T1">Кузнецов</text:span></text:p>
            <text:p text:style-name="P1"><text:span text:style-name="T1">Шепелев</text:span></text:p>
            <text:p text:style-name="P1"><text:span text:style-name="T1">Светиков</text:span></text:p>
            <text:p text:style-name="P1"><text:span text:style-name="T1">Дудченко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4" draw:layer="layout" svg:width="25.199cm" svg:height="1.872cm" svg:x="1.4cm" svg:y="0.628cm" presentation:class="title" presentation:user-transformed="true">
          <draw:text-box>
            <text:p text:style-name="P4"><text:span text:style-name="T2">Сбор данных по Горячему ключу</text:span></text:p>
          </draw:text-box>
        </draw:frame>
        <draw:frame draw:style-name="gr2" draw:text-style-name="P5" draw:layer="layout" svg:width="23.631cm" svg:height="12.813cm" svg:x="2.369cm" svg:y="2.444cm">
          <draw:image xlink:href="Pictures/10000001000004D0000002E5CA4BE2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6-10T18:08:59.984000000</meta:creation-date>
    <dc:date>2026-06-10T18:16:50.581000000</dc:date>
    <meta:editing-duration>PT7M51S</meta:editing-duration>
    <meta:editing-cycles>1</meta:editing-cycles>
    <meta:document-statistic meta:object-count="29"/>
    <meta:generator>LibreOffice/7.6.7.2$Windows_X86_64 LibreOffice_project/dd47e4b30cb7dab30588d6c79c651f218165e3c5</meta:generator>
  </office:meta>
</office:document-meta>
</file>